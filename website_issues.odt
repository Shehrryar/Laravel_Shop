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e249" officeooo:paragraph-rsid="0016e249"/>
    </style:style>
    <style:style style:name="T1" style:family="text">
      <style:text-properties fo:font-size="18pt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ssues in the Ecommerence Website:</text:span><text:line-break/></text:p>
      <text:p text:style-name="P1">1. Chat functionality by using websockets is not completed due to some client side issues.<text:line-break/>2. API for Sign in using (Google, Facebook) is pending<text:line-break/>3. API for Payment method us pending<text:line-break/>4. Functionaliy for changing image for size and color is not updated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0:08:59.332057923</meta:creation-date>
    <dc:date>2025-04-24T10:14:16.845358784</dc:date>
    <meta:editing-duration>PT5M18S</meta:editing-duration>
    <meta:editing-cycles>1</meta:editing-cycles>
    <meta:document-statistic meta:table-count="0" meta:image-count="0" meta:object-count="0" meta:page-count="1" meta:paragraph-count="2" meta:word-count="49" meta:character-count="287" meta:non-whitespace-character-count="238"/>
    <meta:generator>LibreOffice/7.3.7.2$Linux_X86_64 LibreOffice_project/30$Build-2</meta:generator>
  </office:meta>
</office:document-meta>
</file>